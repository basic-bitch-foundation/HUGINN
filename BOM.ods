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7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4.359cm"/>
    </style:style>
    <style:style style:name="co5" style:family="table-column">
      <style:table-column-properties fo:break-before="auto" style:column-width="2.448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5.547cm"/>
    </style:style>
    <style:style style:name="co8" style:family="table-column">
      <style:table-column-properties fo:break-before="auto" style:column-width="6.332cm"/>
    </style:style>
    <style:style style:name="co9" style:family="table-column">
      <style:table-column-properties fo:break-before="auto" style:column-width="9.899cm"/>
    </style:style>
    <style:style style:name="co10" style:family="table-column">
      <style:table-column-properties fo:break-before="auto" style:column-width="2.342cm"/>
    </style:style>
    <style:style style:name="co11" style:family="table-column">
      <style:table-column-properties fo:break-before="auto" style:column-width="2.215cm"/>
    </style:style>
    <style:style style:name="co12" style:family="table-column">
      <style:table-column-properties fo:break-before="auto" style:column-width="2.087cm"/>
    </style:style>
    <style:style style:name="co13" style:family="table-column">
      <style:table-column-properties fo:break-before="auto" style:column-width="13.72cm"/>
    </style:style>
    <style:style style:name="co14" style:family="table-column">
      <style:table-column-properties fo:break-before="auto" style:column-width="8.53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_LoRa_Pag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 / Model</text:p>
          </table:table-cell>
          <table:table-cell office:value-type="string" calcext:value-type="string">
            <text:p>Package / 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 Link</text:p>
          </table:table-cell>
          <table:table-cell office:value-type="string" calcext:value-type="string">
            <text:p>Price (USD)</text:p>
          </table:table-cell>
          <table:table-cell office:value-type="string" calcext:value-type="string">
            <text:p>Price (INR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ontrollers</text:p>
          </table:table-cell>
          <table:table-cell office:value-type="string" calcext:value-type="string">
            <text:p>ESP32-S3 Dev Board</text:p>
          </table:table-cell>
          <table:table-cell office:value-type="string" calcext:value-type="string">
            <text:p>N8R8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ESP32-S3-DEVKITC-1-N8R8</text:p>
          </table:table-cell>
          <table:table-cell office:value-type="string" calcext:value-type="string">
            <text:p>DEVKITC-1U (castellated module)</text:p>
          </table:table-cell>
          <table:table-cell office:value-type="string" calcext:value-type="string">
            <text:p>ESP32-S3 Development Board (8MB Flash / 8MB PSRAM)</text:p>
          </table:table-cell>
          <table:table-cell office:value-type="string" calcext:value-type="string">
            <text:p><text:a xlink:href="https://www.google.com/aclk?sa=L&amp;ai=DChsSEwjEvfWU2deVAxVB6xYFHZQZMoUYACICCAEQCxoCdGw&amp;co=1&amp;ase=2&amp;gclid=Cj0KCQjwguLSBhDLARIsAH-yPrF76Ts5-WUZgxOHAwJkdbsmrza8Sxpp4_q3oGu6wME0ptJjEz-bC0gaAtZpEALw_wcB&amp;cid=CAASuwHkaC7hPCUJhvuLTECl-XQF2AU0l7f3wNdbiV2VJpPlv39GQgrMTRj58WC4EFzsiswl2nSSDmL67ZyekDqA5OhbNI-YGHezXIWyJgSVa4D2W5RLiA1PPqf82y1VhR0BXIBbRe0OMbfSBLEYasLbnt4cLReAqtFwWSrYbv5GlNW784cpZkr1INtOc1g8Fdzj1J7Geem5RXqmn9AiM2TjAB8DwinlQWcMikgGezjHgl4d09R6wVVZ2x-rV57g&amp;cce=2&amp;category=acrcp_v1_32&amp;sig=AOD64_1UhsjB-aErWjvVrza8y_RfvNIO-w&amp;ctype=5&amp;q=&amp;nis=4&amp;ved=2ahUKEwj-lfCU2deVAxVnmq8BHcGwLMwQ5bgDKAB6BAgKEBQ&amp;adurl=" xlink:type="simple">here</text:a></text:p>
          </table:table-cell>
          <table:table-cell/>
          <table:table-cell office:value-type="float" office:value="1304.1" calcext:value-type="float">
            <text:p>1304.1</text:p>
          </table:table-cell>
          <table:table-cell office:value-type="string" calcext:value-type="string">
            <text:p>Used as system module - not a bare SoC</text:p>
          </table:table-cell>
          <table:table-cell/>
        </table:table-row>
        <table:table-row table:style-name="ro1">
          <table:table-cell office:value-type="string" calcext:value-type="string">
            <text:p>LoR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 Modules</text:p>
          </table:table-cell>
          <table:table-cell office:value-type="string" calcext:value-type="string">
            <text:p>LoRa Transceiver Module</text:p>
          </table:table-cell>
          <table:table-cell office:value-type="string" calcext:value-type="string">
            <text:p>433MHz</text:p>
          </table:table-cell>
          <table:table-cell office:value-type="string" calcext:value-type="string">
            <text:p>Ai-Thinker</text:p>
          </table:table-cell>
          <table:table-cell office:value-type="string" calcext:value-type="string">
            <text:p>RA-02 (SX1278)</text:p>
          </table:table-cell>
          <table:table-cell office:value-type="string" calcext:value-type="string">
            <text:p>SMD Module - 16 pin (2x8 top/bottom)</text:p>
          </table:table-cell>
          <table:table-cell office:value-type="string" calcext:value-type="string">
            <text:p>433 MHz LoRa Transceiver Module (SX1278-based)</text:p>
          </table:table-cell>
          <table:table-cell office:value-type="string" calcext:value-type="string">
            <text:p><text:a xlink:href="https://www.google.com/aclk?sa=L&amp;ai=DChsSEwizk_W42deVAxVXk2YCHcG2BnwYACICCAEQBxoCc20&amp;co=1&amp;ase=2&amp;gclid=Cj0KCQjwguLSBhDLARIsAH-yPrEX88LPrLluleAikRBn43DSrAXPl5yMiYXZ1mrNaplbZkliApu5TUEaAtPdEALw_wcB&amp;cid=CAASuwHkaPv0Yfaz4mWv-1OXcZ_Gp-iO6RlPQEsUyhL4qhaujJhYDsP0NSfLkIxdzEmStEKuNIBoG4OU8GgpDHpGTDvZ88ci5W6qg_k_SbPmSYdkK_sNftzOdOq3vX-B_WVObbdvAn3Yv9UNrXak7Nz23h-uc5iLP3CHJ4xUrGRGJcS_U7zX6STNdeR788fpRAdY7ytfwTv7GlztooTjr92gWfJtmEfTiTxEzvR6BwZ279e4txQdBzA5WYAds1F_&amp;cce=2&amp;category=acrcp_v1_32&amp;sig=AOD64_1FgowfpPsxCzu9ZoI8d5-RN_pN6w&amp;ctype=5&amp;q=&amp;nis=4&amp;ved=2ahUKEwjUqe242deVAxVJTGwGHZSJEVEQ5bgDKAB6BAgNEAs&amp;adurl=" xlink:type="simple">here</text:a>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Confirm 433 MHz vs 868/915 MHz variant needed for your region</text:p>
          </table:table-cell>
          <table:table-cell/>
        </table:table-row>
        <table:table-row table:style-name="ro1">
          <table:table-cell office:value-type="string" calcext:value-type="string">
            <text:p>V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AP2112K-3.3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3.3V 600mA Low Dropout Voltage Regulator</text:p>
          </table:table-cell>
          <table:table-cell office:value-type="string" calcext:value-type="string">
            <text:p><text:a xlink:href="https://robu.in/product/ap2112k-3-3trg1-diodes-inc-ldo-fixed-3-3v-0-6a-40-to-85deg-c/" xlink:type="simple">here</text:a>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LiPo Charge Controller 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Single-Cell Li-Po/Li-Ion Linear Charge Management IC</text:p>
          </table:table-cell>
          <table:table-cell office:value-type="string" calcext:value-type="string">
            <text:p><text:a xlink:href="https://www.digikey.in/en/products/detail/microchip-technology/MCP73831T-2ACI-OT/964301" xlink:type="simple">here</text:a></text:p>
          </table:table-cell>
          <table:table-cell/>
          <table:table-cell office:value-type="float" office:value="71.83" calcext:value-type="float">
            <text:p>71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USB Type-C Receptacle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MD Type-C 16-pin</text:p>
          </table:table-cell>
          <table:table-cell office:value-type="string" calcext:value-type="string">
            <text:p>USB Type-C Power/Data Connector (USB 2.0)</text:p>
          </table:table-cell>
          <table:table-cell office:value-type="string" calcext:value-type="string">
            <text:p><text:a xlink:href="https://www.google.com/aclk?sa=L&amp;ai=DChsSEwjGltWB2teVAxVuaw8CHReDDjEYACICCAEQCBoCdGI&amp;co=1&amp;ase=2&amp;gclid=Cj0KCQjwguLSBhDLARIsAH-yPrEVedKmaSZrKlJSWn5ndbAyeZUFt2HcSamtmaKJpO1EVtvEJz1AwloaAiv2EALw_wcB&amp;cid=CAAS3gHkaM-gBd1hx1C1DFFeI29aLNBrLNkJbyNoEXD_rsZ1wrzXAU3CjH5fCuqvzJkGibuoEjsSmTikN8OTuWDXVgPxgsYMC5tweOeOQ6zmIt862sNuJ_KVTWzuhUELZnTE48Oq2Qcfny5QA7FknKozRTywz1cxPTlEK2HR2PPqb6Wkyp395bNpmxeHbGnLo7-kkyNxvAncla0za68OUkw5woZOaUDy6SmM2-7OHgqJuwCUbIcDMmo9PuytACF97s6cCraQnnaTsbu8k7_T7X3jOVIrjWStp-XI8WFabNj5930&amp;cce=2&amp;category=acrcp_v1_32&amp;sig=AOD64_0zJwo23rgel8aW-SijWC7QxVmxZg&amp;ctype=5&amp;q=&amp;nis=4&amp;ved=2ahUKEwiv3s2B2teVAxXccPUHHcDnJvAQ5bgDKAB6BAgKEAs&amp;adurl=" xlink:type="simple">here</text:a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ifferent from footprint</text:p>
          </table:table-cell>
          <table:table-cell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Battery Connector</text:p>
          </table:table-cell>
          <table:table-cell office:value-type="string" calcext:value-type="string">
            <text:p>2-pi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PH-2 (S2B-PH-K)</text:p>
          </table:table-cell>
          <table:table-cell office:value-type="string" calcext:value-type="string">
            <text:p>JST-PH 2.00mm 2-pin Horizontal</text:p>
          </table:table-cell>
          <table:table-cell office:value-type="string" calcext:value-type="string">
            <text:p>JST-PH 2-Pin Battery Connector</text:p>
          </table:table-cell>
          <table:table-cell office:value-type="string" calcext:value-type="string">
            <text:p><text:a xlink:href="https://robu.in/product/2-pin-jst-xh-2-54mm-pitch-plug-and-socket-with-cable-10-pcs/" xlink:type="simple">here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an skip very optional</text:p>
          </table:table-cell>
          <table:table-cell/>
        </table:table-row>
        <table:table-row table:style-name="ro1">
          <table:table-cell office:value-type="string" calcext:value-type="string">
            <text:p>E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E-Ink Display Connector</text:p>
          </table:table-cell>
          <table:table-cell office:value-type="string" calcext:value-type="string">
            <text:p>8-pin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PinHeader-1x08-2.54mm</text:p>
          </table:table-cell>
          <table:table-cell office:value-type="string" calcext:value-type="string">
            <text:p>2.54mm Pitch 1x08 Vertical Header</text:p>
          </table:table-cell>
          <table:table-cell office:value-type="string" calcext:value-type="string">
            <text:p>2.13" SPI E-Ink Display Header (8-pin)</text:p>
          </table:table-cell>
          <table:table-cell office:value-type="string" calcext:value-type="string">
            <text:p><text:a xlink:href="https://www.evelta.com/2-13inch-e-paper-e-ink-display-module-for-raspberry-pi-pico/?sku=061-19406&amp;srsltid=AfmBOoo5TPE19AGybCOQAJrgABi6ssUdPRdN8u6cEWXtHr5NOBT87Re09QA" xlink:type="simple">here</text:a></text:p>
          </table:table-cell>
          <table:table-cell/>
          <table:table-cell office:value-type="float" office:value="1478" calcext:value-type="float">
            <text:p>1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Momentary switc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SMD 2-pin</text:p>
          </table:table-cell>
          <table:table-cell/>
          <table:table-cell office:value-type="string" calcext:value-type="string">
            <text:p><text:a xlink:href="https://electronicspices.com/product/12x12x9mm-black-color-tactile-momentary-push-button-switch-pack-of-10?srsltid=AfmBOopTxPNHb_PXOFQF4BSLPqIHJ4KNnY-k43nL03YRVc7OJRIXEtiAu4c" xlink:type="simple">here</text:a>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Tactile Push Butto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Tactile SMD 2-pin</text:p>
          </table:table-cell>
          <table:table-cell office:value-type="string" calcext:value-type="string">
            <text:p>SolderPad 5x5mm SMD</text:p>
          </table:table-cell>
          <table:table-cell office:value-type="string" calcext:value-type="string">
            <text:p>Tactile Push Button (Left / Navigation)</text:p>
          </table:table-cell>
          <table:table-cell office:value-type="string" calcext:value-type="string">
            <text:p><text:a xlink:href="https://www.google.com/aclk?sa=L&amp;ai=DChsSEwiZ_sug3deVAxUvXA8CHV-WECIYACICCAEQBxoCdGI&amp;co=1&amp;ase=2&amp;gclid=Cj0KCQjwguLSBhDLARIsAH-yPrF75tAX5h9wRDRaYxkfs__NT39hYmkc1rDnrLvaEJm-EO7A5H9kjZkaArEtEALw_wcB&amp;cid=CAAS3gHkaBYCifv9zPXp1c25_NYnHc7Pt1cAuh5vPeUyPN_wAM8jOFVzI212hI-U5J66jAK8F8YDMkLNVa7TN2eZQfnq1AUJDKA-wX46EoOk21SIv8c45P6Mw6njNRYwCt1FoTeKv1ilNfbIAI9pBV-lvDPACUclWiImLkVwYD2ENmwFaJO9T4nLBVsE2F2kswjM_n8prB22OJ0y8kc-HR3YD8od1xSLp6w4Y7HbcbvOoW_mlq3JTspO5SNQhZOvdOGOwqrrsYfW5K3rCY1_w3nW3Z0lGukKHDWbSVHeoWf8EZY&amp;cce=2&amp;category=acrcp_v1_32&amp;sig=AOD64_2R5pfGbi-9VCF6awLIes6ybcwRAA&amp;ctype=5&amp;q=&amp;nis=4&amp;ved=2ahUKEwi_lMag3deVAxWZb_UHHUaRKRgQ5bgDKAB6BAgIEB0&amp;adurl=" xlink:type="simple">here</text:a>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Tactile Push Butto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Tactile SMD 2-pin</text:p>
          </table:table-cell>
          <table:table-cell office:value-type="string" calcext:value-type="string">
            <text:p>SolderPad 5x5mm SMD</text:p>
          </table:table-cell>
          <table:table-cell office:value-type="string" calcext:value-type="string">
            <text:p>Tactile Push Button (Up / Navigation)</text:p>
          </table:table-cell>
          <table:table-cell office:value-type="string" calcext:value-type="string">
            <text:p>"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Tactile Push Button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Tactile SMD 2-pin</text:p>
          </table:table-cell>
          <table:table-cell office:value-type="string" calcext:value-type="string">
            <text:p>SolderPad 5x5mm SMD</text:p>
          </table:table-cell>
          <table:table-cell office:value-type="string" calcext:value-type="string">
            <text:p>Tactile Push Button (Center / Select)</text:p>
          </table:table-cell>
          <table:table-cell office:value-type="string" calcext:value-type="string">
            <text:p>"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Tactile Push Butt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Tactile SMD 2-pin</text:p>
          </table:table-cell>
          <table:table-cell office:value-type="string" calcext:value-type="string">
            <text:p>SolderPad 5x5mm SMD</text:p>
          </table:table-cell>
          <table:table-cell office:value-type="string" calcext:value-type="string">
            <text:p>Tactile Push Button (Down / Navigation)</text:p>
          </table:table-cell>
          <table:table-cell office:value-type="string" calcext:value-type="string">
            <text:p>"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Tactile Push Butto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Tactile SMD 2-pin</text:p>
          </table:table-cell>
          <table:table-cell office:value-type="string" calcext:value-type="string">
            <text:p>SolderPad 5x5mm SMD</text:p>
          </table:table-cell>
          <table:table-cell office:value-type="string" calcext:value-type="string">
            <text:p>Momentary Tactile Push Button (Right / Navigation)</text:p>
          </table:table-cell>
          <table:table-cell office:value-type="string" calcext:value-type="string">
            <text:p><text:a xlink:href="https://electronicspices.com/product/12x12x9mm-black-color-tactile-momentary-push-button-switch-pack-of-10?srsltid=AfmBOophTFPBqO-XOhQyJLVrubgMkni4JlBe8HmpBdg-6SOrMhFIA3zJTsA" xlink:type="simple">her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Status LED</text:p>
          </table:table-cell>
          <table:table-cell office:value-type="string" calcext:value-type="string">
            <text:p>diode le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LED-0805</text:p>
          </table:table-cell>
          <table:table-cell office:value-type="string" calcext:value-type="string">
            <text:p>SolderPad 5x5mm SMD</text:p>
          </table:table-cell>
          <table:table-cell office:value-type="string" calcext:value-type="string">
            <text:p>Status Indicator L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Charge Status L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LED-0805</text:p>
          </table:table-cell>
          <table:table-cell office:value-type="string" calcext:value-type="string">
            <text:p>SolderPad 5x5mm SMD</text:p>
          </table:table-cell>
          <table:table-cell office:value-type="string" calcext:value-type="string">
            <text:p>Battery Charge Status L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N-Channel MOSF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-Channel MOSFET (Motor Driver Switch)</text:p>
          </table:table-cell>
          <table:table-cell office:value-type="string" calcext:value-type="string">
            <text:p><text:a xlink:href="https://robu.in/product/bss138-slkor-50v-220ma-3-5ω10v220ma-225mw-1-6v1ma-1-n-channel-sot-23-mosfets-rohs/" xlink:type="simple">here</text:a></text:p>
          </table:table-cell>
          <table:table-cell/>
          <table:table-cell office:value-type="float" office:value="2.02" calcext:value-type="float">
            <text:p>2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Flyback/Protection Dio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N4148 or equiv.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iode (Motor Flyback Protectio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C-Series</text:p>
          </table:table-cell>
          <table:table-cell office:value-type="string" calcext:value-type="string">
            <text:p>Axial THT (DIN0207)</text:p>
          </table:table-cell>
          <table:table-cell office:value-type="string" calcext:value-type="string">
            <text:p>100Ω Resistor (LoRa Reset Gat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C-Series</text:p>
          </table:table-cell>
          <table:table-cell office:value-type="string" calcext:value-type="string">
            <text:p>Axial THT (DIN0207)</text:p>
          </table:table-cell>
          <table:table-cell office:value-type="string" calcext:value-type="string">
            <text:p>1kΩ Resistor (Status LED Current Limit)</text:p>
          </table:table-cell>
          <table:table-cell table:number-columns-repeated="3"/>
          <table:table-cell office:value-type="string" calcext:value-type="string">
            <text:p>regional prices and availiblity varries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kΩ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C-Series</text:p>
          </table:table-cell>
          <table:table-cell office:value-type="string" calcext:value-type="string">
            <text:p>Axial THT (DIN0207)</text:p>
          </table:table-cell>
          <table:table-cell office:value-type="string" calcext:value-type="string">
            <text:p>2kΩ Resistor (Charge IC PROG - Sets Charge Current)</text:p>
          </table:table-cell>
          <table:table-cell table:number-columns-repeated="3"/>
          <table:table-cell office:value-type="string" calcext:value-type="string">
            <text:p>regional prices and availiblity varries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C-Series</text:p>
          </table:table-cell>
          <table:table-cell office:value-type="string" calcext:value-type="string">
            <text:p>Axial THT (DIN0207)</text:p>
          </table:table-cell>
          <table:table-cell office:value-type="string" calcext:value-type="string">
            <text:p>10kΩ Resistor (MOSFET Gate Pulldown)</text:p>
          </table:table-cell>
          <table:table-cell table:number-columns-repeated="3"/>
          <table:table-cell office:value-type="string" calcext:value-type="string">
            <text:p>regional prices and availiblity varries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.1kΩ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C-Series</text:p>
          </table:table-cell>
          <table:table-cell office:value-type="string" calcext:value-type="string">
            <text:p>Axial THT (DIN0207)</text:p>
          </table:table-cell>
          <table:table-cell office:value-type="string" calcext:value-type="string">
            <text:p>5.1kΩ Resistor (USB-C CC1 Pull-down)</text:p>
          </table:table-cell>
          <table:table-cell table:number-columns-repeated="3"/>
          <table:table-cell office:value-type="string" calcext:value-type="string">
            <text:p>regional prices and availiblity varries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C-Series</text:p>
          </table:table-cell>
          <table:table-cell office:value-type="string" calcext:value-type="string">
            <text:p>Axial THT (DIN0207)</text:p>
          </table:table-cell>
          <table:table-cell office:value-type="string" calcext:value-type="string">
            <text:p>1kΩ Resistor (Charge LED Current Limi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.1kΩ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C-Series</text:p>
          </table:table-cell>
          <table:table-cell office:value-type="string" calcext:value-type="string">
            <text:p>Axial THT (DIN0207)</text:p>
          </table:table-cell>
          <table:table-cell office:value-type="string" calcext:value-type="string">
            <text:p>5.1kΩ Resistor (USB-C CC2 Pull-dow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-Series</text:p>
          </table:table-cell>
          <table:table-cell office:value-type="string" calcext:value-type="string">
            <text:p>0805 SMD</text:p>
          </table:table-cell>
          <table:table-cell office:value-type="string" calcext:value-type="string">
            <text:p>10uF Ceramic Capacitor (E-Ink Supply Decoupling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P-Elec</text:p>
          </table:table-cell>
          <table:table-cell office:value-type="string" calcext:value-type="string">
            <text:p>5x5.3mm Electrolytic</text:p>
          </table:table-cell>
          <table:table-cell office:value-type="string" calcext:value-type="string">
            <text:p>100uF Electrolytic Capacitor (E-Ink Bulk Decoupling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-Series</text:p>
          </table:table-cell>
          <table:table-cell office:value-type="string" calcext:value-type="string">
            <text:p>1206 SMD</text:p>
          </table:table-cell>
          <table:table-cell office:value-type="string" calcext:value-type="string">
            <text:p>47uF Capacitor (ESP32 Supply Decoupling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-Disc</text:p>
          </table:table-cell>
          <table:table-cell office:value-type="string" calcext:value-type="string">
            <text:p>THT Disc 5mm</text:p>
          </table:table-cell>
          <table:table-cell office:value-type="string" calcext:value-type="string">
            <text:p>100nF Capacitor (ESP32 Supply Decoupling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-Series</text:p>
          </table:table-cell>
          <table:table-cell office:value-type="string" calcext:value-type="string">
            <text:p>0805 SMD</text:p>
          </table:table-cell>
          <table:table-cell office:value-type="string" calcext:value-type="string">
            <text:p>10uF Capacitor (LoRa Module Supply Decoupling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P-Elec</text:p>
          </table:table-cell>
          <table:table-cell office:value-type="string" calcext:value-type="string">
            <text:p>5x5.3mm Electrolytic</text:p>
          </table:table-cell>
          <table:table-cell office:value-type="string" calcext:value-type="string">
            <text:p>100uF Electrolytic Capacitor (LoRa Module Bulk Decoupling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-Series</text:p>
          </table:table-cell>
          <table:table-cell office:value-type="string" calcext:value-type="string">
            <text:p>0805 SMD</text:p>
          </table:table-cell>
          <table:table-cell office:value-type="string" calcext:value-type="string">
            <text:p>10uF Capacitor (LDO Input Decoupling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-Series</text:p>
          </table:table-cell>
          <table:table-cell office:value-type="string" calcext:value-type="string">
            <text:p>0805 SMD</text:p>
          </table:table-cell>
          <table:table-cell office:value-type="string" calcext:value-type="string">
            <text:p>10uF Capacitor (LDO Output Decoupling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-Series</text:p>
          </table:table-cell>
          <table:table-cell office:value-type="string" calcext:value-type="string">
            <text:p>0805 SMD</text:p>
          </table:table-cell>
          <table:table-cell office:value-type="string" calcext:value-type="string">
            <text:p>4.7uF Capacitor (Charge IC VDD Decoupling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-Series</text:p>
          </table:table-cell>
          <table:table-cell office:value-type="string" calcext:value-type="string">
            <text:p>0805 SMD</text:p>
          </table:table-cell>
          <table:table-cell office:value-type="string" calcext:value-type="string">
            <text:p>4.7uF Capacitor (Charge IC VBAT Decoupling)</text:p>
          </table:table-cell>
          <table:table-cell table:number-columns-repeated="3"/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s</text:p>
          </table:table-cell>
          <table:table-cell office:value-type="string" calcext:value-type="string">
            <text:p>Coin Vibration Mo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oin Vibe 10mm</text:p>
          </table:table-cell>
          <table:table-cell office:value-type="string" calcext:value-type="string">
            <text:p>SolderPad 5x5mm SMD</text:p>
          </table:table-cell>
          <table:table-cell office:value-type="string" calcext:value-type="string">
            <text:p>Coin Vibration Motor (Haptic Feedback)</text:p>
          </table:table-cell>
          <table:table-cell office:value-type="string" calcext:value-type="string">
            <text:p><text:a xlink:href="https://robu.in/product/erm-coin-vibration-motor-8-mm-dia-2-mm-width/" xlink:type="simple">here</text:a>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style-name="ce1" office:value-type="string" calcext:value-type="string">
            <text:p>TOTAL = </text:p>
          </table:table-cell>
          <table:table-cell table:style-name="ce1" office:value-type="string" calcext:value-type="string">
            <text:p>~3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16T23:23:42.923572498</dc:date>
    <meta:editing-duration>PT5M21S</meta:editing-duration>
    <meta:editing-cycles>2</meta:editing-cycles>
    <meta:generator>LibreOffice/7.3.7.2$Linux_X86_64 LibreOffice_project/30$Build-2</meta:generator>
    <meta:document-statistic meta:table-count="1" meta:cell-count="361" meta:object-count="0"/>
  </office:meta>
</office:document-meta>
</file>